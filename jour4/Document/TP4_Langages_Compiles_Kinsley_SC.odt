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eded" fo:padding="0.1042in" fo:border="0.75pt solid #bdc3c7">
        <style:background-image/>
      </style:table-cell-properties>
    </style:style>
    <style:style style:name="Table1.A2" style:family="table-cell">
      <style:table-cell-properties style:vertical-align="" fo:padding="0.1042in" fo:border="0.75pt solid #bdc3c7"/>
    </style:style>
    <style:style style:name="Table1.B2" style:family="table-cell">
      <style:table-cell-properties style:vertical-align="" fo:padding="0.1042in" fo:border="0.75pt solid #bdc3c7"/>
    </style:style>
    <style:style style:name="Table1.C2" style:family="table-cell">
      <style:table-cell-properties style:vertical-align="" fo:padding="0.1042in" fo:border="0.75pt solid #bdc3c7"/>
    </style:style>
    <style:style style:name="Table1.A3" style:family="table-cell">
      <style:table-cell-properties style:vertical-align="" fo:background-color="#f9f9f9" fo:padding="0.1042in" fo:border="0.75pt solid #bdc3c7">
        <style:background-image/>
      </style:table-cell-properties>
    </style:style>
    <style:style style:name="Table1.A4" style:family="table-cell">
      <style:table-cell-properties style:vertical-align="" fo:padding="0.1042in" fo:border="0.75pt solid #bdc3c7"/>
    </style:style>
    <style:style style:name="Table1.B4" style:family="table-cell">
      <style:table-cell-properties style:vertical-align="" fo:padding="0.1042in" fo:border="0.75pt solid #bdc3c7"/>
    </style:style>
    <style:style style:name="Table1.C4" style:family="table-cell">
      <style:table-cell-properties style:vertical-align="" fo:padding="0.1042in" fo:border="0.75pt solid #bdc3c7"/>
    </style:style>
    <style:style style:name="Table1.A6" style:family="table-cell">
      <style:table-cell-properties style:vertical-align="" fo:padding="0.1042in" fo:border="0.75pt solid #bdc3c7"/>
    </style:style>
    <style:style style:name="Table1.B6" style:family="table-cell">
      <style:table-cell-properties style:vertical-align="" fo:padding="0.1042in" fo:border="0.75pt solid #bdc3c7"/>
    </style:style>
    <style:style style:name="Table1.C6" style:family="table-cell">
      <style:table-cell-properties style:vertical-align="" fo:padding="0.1042in" fo:border="0.75pt solid #bdc3c7"/>
    </style:style>
    <style:style style:name="Table1.A8" style:family="table-cell">
      <style:table-cell-properties style:vertical-align="" fo:padding="0.1042in" fo:border="0.75pt solid #bdc3c7"/>
    </style:style>
    <style:style style:name="Table1.B8" style:family="table-cell">
      <style:table-cell-properties style:vertical-align="" fo:padding="0.1042in" fo:border="0.75pt solid #bdc3c7"/>
    </style:style>
    <style:style style:name="Table1.C8" style:family="table-cell">
      <style:table-cell-properties style:vertical-align="" fo:padding="0.1042in" fo:border="0.75pt solid #bdc3c7"/>
    </style:style>
    <style:style style:name="Table1.A10" style:family="table-cell">
      <style:table-cell-properties style:vertical-align="" fo:padding="0.1042in" fo:border="0.75pt solid #bdc3c7"/>
    </style:style>
    <style:style style:name="Table1.B10" style:family="table-cell">
      <style:table-cell-properties style:vertical-align="" fo:padding="0.1042in" fo:border="0.75pt solid #bdc3c7"/>
    </style:style>
    <style:style style:name="Table1.C10" style:family="table-cell">
      <style:table-cell-properties style:vertical-align="" fo:padding="0.1042in" fo:border="0.75pt solid #bdc3c7"/>
    </style:style>
    <style:style style:name="P1" style:family="paragraph" style:parent-style-name="Standard" style:list-style-name="WWNum1">
      <style:paragraph-properties fo:margin-left="0.4165in" fo:margin-right="0in" fo:line-height="125%" fo:text-indent="-0.25in" style:auto-text-indent="false" fo:padding="0in" fo:border="none"/>
    </style:style>
    <style:style style:name="P2" style:family="paragraph" style:parent-style-name="Standard" style:list-style-name="WWNum2">
      <style:paragraph-properties fo:margin-left="0.4165in" fo:margin-right="0in" fo:margin-top="0in" fo:margin-bottom="0in" loext:contextual-spacing="false" fo:line-height="125%" fo:text-indent="-0.25in" style:auto-text-indent="false" fo:padding="0in" fo:border="none"/>
    </style:style>
    <style:style style:name="P3" style:family="paragraph" style:parent-style-name="Standard" style:list-style-name="WWNum2">
      <style:paragraph-properties fo:margin-left="0.4165in" fo:margin-right="0in" fo:margin-top="0in" fo:margin-bottom="0in" loext:contextual-spacing="false" fo:line-height="125%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4165in" fo:margin-right="0in" fo:margin-top="0in" fo:margin-bottom="0in" loext:contextual-spacing="false" fo:line-height="125%" fo:text-indent="-0.25in" style:auto-text-indent="false" fo:padding="0in" fo:border="none"/>
    </style:style>
    <style:style style:name="P5" style:family="paragraph" style:parent-style-name="Standard">
      <style:paragraph-properties fo:margin-top="0.1043in" fo:margin-bottom="0in" loext:contextual-spacing="false" fo:line-height="125%" fo:padding="0in" fo:border="none"/>
    </style:style>
    <style:style style:name="P6" style:family="paragraph" style:parent-style-name="Standard">
      <style:paragraph-properties fo:margin-top="0.1043in" fo:margin-bottom="0.1043in" loext:contextual-spacing="false" fo:line-height="125%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Heading_20_2">
      <style:paragraph-properties fo:margin-top="0in" fo:margin-bottom="0.1563in" loext:contextual-spacing="false" fo:line-height="100%" fo:padding="0in" fo:border="none"/>
    </style:style>
    <style:style style:name="P10" style:family="paragraph" style:parent-style-name="Heading_20_2">
      <style:paragraph-properties fo:margin-top="0.3126in" fo:margin-bottom="0.1563in" loext:contextual-spacing="false" fo:line-height="100%" fo:padding="0in" fo:border="none"/>
    </style:style>
    <style:style style:name="P11" style:family="paragraph" style:parent-style-name="Heading_20_1" style:master-page-name="Standard">
      <style:paragraph-properties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fo:font-weight="bold" style:font-name-asian="Arial2" style:font-weight-asian="bold" style:font-name-complex="Arial2" style:font-weight-complex="bold"/>
    </style:style>
    <style:style style:name="T4" style:family="text">
      <style:text-properties style:font-name="Arial" style:font-name-asian="Arial2" style:font-name-complex="Arial2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TP4</text:span></text:p>
      <text:p text:style-name="Standard">Kinsley SUEDILE COLLET - B1 Info Ynov Montpellier</text:p>
      <text:p text:style-name="P9"><text:span text:style-name="T2">Partie 1</text:span></text:p>
      <text:list xml:id="list2163918027" text:style-name="WWNum1">
        <text:list-item>
          <text:p text:style-name="P1"><text:span text:style-name="T3">Les adresses de a, b, c sont-elles consécutives ? Quelle est la différence entre elles ?</text:span><text:span text:style-name="T5"><text:line-break/></text:span><text:span text:style-name="T4">Oui, elles se suivent en mémoire. La différence est de 4 octets d'écart entre chaque adresse, car un int occupe exactement 4 octets.</text:span></text:p>
        </text:list-item>
        <text:list-item>
          <text:p text:style-name="P1"><text:span text:style-name="T3">Dans quel sens la stack grandit-elle sur votre machine ?</text:span><text:span text:style-name="T5"><text:line-break/></text:span><text:span text:style-name="T4">La stack grandit vers le bas (des adresses les plus hautes vers les adresses les plus basses).</text:span></text:p>
        </text:list-item>
        <text:list-item>
          <text:p text:style-name="P1"><text:span text:style-name="T3">Que devient la variable a une fois la fonction afficher terminée ?</text:span><text:span text:style-name="T5"><text:line-break/></text:span><text:span text:style-name="T4">Elle est détruite automatiquement. Le bloc de la fonction est dépilé, donc la mémoire est libérée </text:span>directement<text:span text:style-name="T4">.</text:span></text:p>
        </text:list-item>
      </text:list>
      <text:p text:style-name="P10"><text:span text:style-name="T4">Partie 2</text:span></text:p>
      <text:list xml:id="list3274662132" text:style-name="WWNum2">
        <text:list-item>
          <text:p text:style-name="P2"><text:span text:style-name="T3">Programme A (Buffer overflow) :</text:span><text:span text:style-name="T4"> La boucle va jusqu'à i &lt;= 5. Un tableau de taille 5 s'arrête à l'index 4. À l'indice 5, on écrit en dehors des limites.</text:span><text:span text:style-name="T5"><text:line-break/></text:span><text:span text:style-name="T3">Correction :</text:span><text:span text:style-name="T4"> Changer la condition de la boucle pour s'arrêter avant 5 (utiliser i &lt; 5 au lieu de &lt;=).</text:span></text:p>
        </text:list-item>
        <text:list-item>
          <text:p text:style-name="P2"><text:span text:style-name="T3">Programme B (Dangling pointer) :</text:span><text:span text:style-name="T4"> La fonction retourne l'adresse d'un tableau local (créé sur la stack). Quand la fonction se termine, le tableau est détruit. Le pointeur tape dans le vide.</text:span><text:span text:style-name="T5"><text:line-break/></text:span><text:span text:style-name="T3">Correction :</text:span><text:span text:style-name="T4"> Allouer le tableau dynamiquement sur le Heap avec malloc pour qu'il survive à la fin de la fonction.</text:span></text:p>
        </text:list-item>
        <text:list-item>
          <text:p text:style-name="P2"><text:span text:style-name="T3">Programme C (Buffer overflow sur chaîne) :</text:span><text:span text:style-name="T4"> On alloue 5 octets, mais "Alexandre" + le \0 de fin nécessitent 10 octets. Ça déborde.</text:span><text:span text:style-name="T5"><text:line-break/></text:span><text:span text:style-name="T3">Correction :</text:span><text:span text:style-name="T4"> Allouer suffisamment d'espace avec un malloc de 10 octets (10 * sizeof(char)).</text:span></text:p>
        </text:list-item>
        <text:list-item>
          <text:p text:style-name="P2"><text:span text:style-name="T3">2.3 Sanitizers :</text:span><text:span text:style-name="T4"> Si on compile le Prog A avec -fsanitize=address, le terminal va afficher une erreur (généralement heap-buffer-overflow ou stack-buffer-overflow) en indiquant la ligne exacte où on a dépassé la taille du tableau alloué.</text:span></text:p>
        </text:list-item>
      </text:list>
      <text:p text:style-name="P5"/>
      <text:p text:style-name="P10"><text:span text:style-name="T4">Partie 5</text:span>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6"><text:span text:style-name="T3">Concept</text:span></text:p>
            </table:table-cell>
            <table:table-cell table:style-name="Table1.A1" office:value-type="string">
              <text:p text:style-name="P6"><text:span text:style-name="T3">Définition</text:span></text:p>
            </table:table-cell>
            <table:table-cell table:style-name="Table1.A1" office:value-type="string">
              <text:p text:style-name="P6"><text:span text:style-name="T3">Exemple</text:span></text:p>
              <text:p text:style-name="P8"><text:span text:style-name="T4"><text:s/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3">Stack</text:span></text:p>
          </table:table-cell>
          <table:table-cell table:style-name="Table1.B2" office:value-type="string">
            <text:p text:style-name="P6"><text:span text:style-name="T4">Mémoire locale, rapide, se gère toute seule. Taille limitée.</text:span></text:p>
          </table:table-cell>
          <table:table-cell table:style-name="Table1.C2" office:value-type="string">
            <text:p text:style-name="P6"><text:span text:style-name="T4">int a = 10;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3">Heap</text:span></text:p>
          </table:table-cell>
          <table:table-cell table:style-name="Table1.A3" office:value-type="string">
            <text:p text:style-name="P6"><text:span text:style-name="T4">Mémoire dynamique, à gérer à la main. Énorme (limite = RAM).</text:span></text:p>
          </table:table-cell>
          <table:table-cell table:style-name="Table1.A3" office:value-type="string">
            <text:p text:style-name="P6"><text:span text:style-name="T4">malloc() ou new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3">malloc</text:span></text:p>
          </table:table-cell>
          <table:table-cell table:style-name="Table1.B4" office:value-type="string">
            <text:p text:style-name="P6"><text:span text:style-name="T4">Demande de la mémoire au système sur le Heap.</text:span></text:p>
          </table:table-cell>
          <table:table-cell table:style-name="Table1.C4" office:value-type="string">
            <text:p text:style-name="P6"><text:span text:style-name="T4">malloc(10 * sizeof(int));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3">free</text:span></text:p>
          </table:table-cell>
          <table:table-cell table:style-name="Table1.A3" office:value-type="string">
            <text:p text:style-name="P6"><text:span text:style-name="T4">Rend la mémoire au système. Toujours après un malloc !</text:span></text:p>
          </table:table-cell>
          <table:table-cell table:style-name="Table1.A3" office:value-type="string">
            <text:p text:style-name="P6"><text:span text:style-name="T4">free(p);</text:span></text:p>
          </table:table-cell>
        </table:table-row>
        <table:table-row table:style-name="Table1.1">
          <table:table-cell table:style-name="Table1.A6" office:value-type="string">
            <text:p text:style-name="P6"><text:span text:style-name="T3">Memory leak</text:span></text:p>
          </table:table-cell>
          <table:table-cell table:style-name="Table1.B6" office:value-type="string">
            <text:p text:style-name="P6"><text:span text:style-name="T4">Fuite : faire un malloc mais oublier de faire le free à la fin.</text:span></text:p>
          </table:table-cell>
          <table:table-cell table:style-name="Table1.C6" office:value-type="string">
            <text:p text:style-name="P6"><text:span text:style-name="T4">Oublier free(tab);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3">Dangling pointer</text:span></text:p>
          </table:table-cell>
          <table:table-cell table:style-name="Table1.A3" office:value-type="string">
            <text:p text:style-name="P6"><text:span text:style-name="T4">Pointeur fou : pointe vers une zone mémoire déjà libérée.</text:span></text:p>
          </table:table-cell>
          <table:table-cell table:style-name="Table1.A3" office:value-type="string">
            <text:p text:style-name="P6"><text:span text:style-name="T4">Utiliser p après un free(p)</text:span></text:p>
          </table:table-cell>
        </table:table-row>
        <table:table-row table:style-name="Table1.1">
          <table:table-cell table:style-name="Table1.A8" office:value-type="string">
            <text:p text:style-name="P6"><text:span text:style-name="T3">Buffer overflow</text:span></text:p>
          </table:table-cell>
          <table:table-cell table:style-name="Table1.B8" office:value-type="string">
            <text:p text:style-name="P6"><text:span text:style-name="T4">Déborder : écrire ou lire en dehors des limites d'un tableau.</text:span></text:p>
          </table:table-cell>
          <table:table-cell table:style-name="Table1.C8" office:value-type="string">
            <text:p text:style-name="P6"><text:span text:style-name="T4">tab[5] sur un array de taille 5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3">Classe</text:span></text:p>
          </table:table-cell>
          <table:table-cell table:style-name="Table1.A3" office:value-type="string">
            <text:p text:style-name="P6"><text:span text:style-name="T4">Plan de construction en POO (regroupe variables et fonctions).</text:span></text:p>
          </table:table-cell>
          <table:table-cell table:style-name="Table1.A3" office:value-type="string">
            <text:p text:style-name="P6"><text:span text:style-name="T4">class Etudiant {...};</text:span></text:p>
          </table:table-cell>
        </table:table-row>
        <table:table-row table:style-name="Table1.1">
          <table:table-cell table:style-name="Table1.A10" office:value-type="string">
            <text:p text:style-name="P6"><text:span text:style-name="T3">Constructeur</text:span></text:p>
          </table:table-cell>
          <table:table-cell table:style-name="Table1.B10" office:value-type="string">
            <text:p text:style-name="P6"><text:span text:style-name="T4">Fonction spéciale appelée à la création pour initialiser l'objet.</text:span></text:p>
          </table:table-cell>
          <table:table-cell table:style-name="Table1.C10" office:value-type="string">
            <text:p text:style-name="P6"><text:span text:style-name="T4">Etudiant() { age = 0; }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3">Encapsulation</text:span></text:p>
          </table:table-cell>
          <table:table-cell table:style-name="Table1.A3" office:value-type="string">
            <text:p text:style-name="P6"><text:span text:style-name="T4">Cacher les variables internes pour protéger les données.</text:span></text:p>
          </table:table-cell>
          <table:table-cell table:style-name="Table1.A3" office:value-type="string">
            <text:p text:style-name="P6"><text:span text:style-name="T4">Mettre les attributs en privat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6" meta:word-count="445" meta:character-count="2556" meta:non-whitespace-character-count="2162"/>
    <meta:generator>LibreOfficeDev/6.0.5.2$Linux_X86_64 LibreOffice_project/</meta:generator>
  </office:meta>
</office:document-meta>
</file>